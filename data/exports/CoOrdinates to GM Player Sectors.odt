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26f" officeooo:paragraph-rsid="001b426f"/>
    </style:style>
    <style:style style:name="P2" style:family="paragraph" style:parent-style-name="Standard">
      <style:text-properties officeooo:paragraph-rsid="001b426f"/>
    </style:style>
    <style:style style:name="T1" style:family="text">
      <style:text-properties officeooo:rsid="001b9f44"/>
    </style:style>
    <style:style style:name="T2" style:family="text">
      <style:text-properties officeooo:rsid="001b4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description of how to convert the co-ordiantes found in a terrain map file <text:span text:style-name="T1">which mean nothing to players or GM’s;</text:span> into player and GM friendly Sectors. <text:span text:style-name="T1">T</text:span>he convention is to use &lt;Object Name&gt; [&lt;Sector&gt;] with in the square brackets EG</text:p>
      <text:p text:style-name="P2"/>
      <text:p text:style-name="P2"><text:span text:style-name="T2">Zero Station [N14]</text:span><text:line-break/><text:line-break/><text:line-break/><text:span text:style-name="T2">Conversion:</text:span><text:line-break/><text:line-break/>Sector labels are generated from the map’s x and z coordinates using a fixed 20,000-unit grid. The system treats (-240000, 280000) as the grid origin. To convert a point into a sector: Subtract the origin: dx = x - (-240000) dz = z - 280000 Divide by 20000 and floor the result: col_index = floor(dx / 20000) row_index = floor(dz / 20000) Convert the column to a 2-digit number using col_index % 100 so columns wrap 00 to 99. Convert the row to a letter using row_index % 26 where 0 = A, 1 = B, ..., 25 = Z. Format as Letter + 2-digit number, for example A05. Example: If x = -140000 and z = 280000: dx = 100000 dz = 0 col_index = 5 row_index = 0 sector = A05 Important behavior: x increasing moves the number upward left-to-right. z decreasing moves from A to Z, because the origin starts at the top edge (280000). The code wraps with modulo, so sectors repeat every 100 columns and 26 row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4T16:19:13.474858100</meta:creation-date>
    <dc:date>2026-03-14T16:24:05.555326100</dc:date>
    <meta:editing-duration>PT3M52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2" meta:word-count="219" meta:character-count="1168" meta:non-whitespace-character-count="947"/>
  </office:meta>
</office:document-meta>
</file>